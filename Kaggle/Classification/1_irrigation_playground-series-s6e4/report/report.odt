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F0000033DC34A4EFDC8D5644E.png" manifest:media-type="image/png"/>
  <manifest:file-entry manifest:full-path="Pictures/10000201000001550000015AE7D200EB415B8D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1f0" officeooo:paragraph-rsid="000611f0"/>
    </style:style>
    <style:style style:name="P2" style:family="paragraph" style:parent-style-name="Standard">
      <style:text-properties officeooo:paragraph-rsid="000611f0"/>
    </style:style>
    <style:style style:name="P3" style:family="paragraph" style:parent-style-name="Standard">
      <style:text-properties style:font-name="aakar" officeooo:rsid="0003c374" officeooo:paragraph-rsid="0003c374"/>
    </style:style>
    <style:style style:name="P4" style:family="paragraph" style:parent-style-name="Standard">
      <style:text-properties style:font-name="aakar" officeooo:rsid="000611f0" officeooo:paragraph-rsid="000611f0"/>
    </style:style>
    <style:style style:name="P5" style:family="paragraph" style:parent-style-name="Standard">
      <style:text-properties style:font-name="aakar" officeooo:rsid="000611f0" officeooo:paragraph-rsid="0007f487"/>
    </style:style>
    <style:style style:name="P6" style:family="paragraph" style:parent-style-name="Standard">
      <style:text-properties style:font-name="aakar" officeooo:paragraph-rsid="000611f0"/>
    </style:style>
    <style:style style:name="P7" style:family="paragraph" style:parent-style-name="Standard">
      <style:text-properties style:font-name="aakar" officeooo:rsid="000a6535" officeooo:paragraph-rsid="000a6535"/>
    </style:style>
    <style:style style:name="P8" style:family="paragraph" style:parent-style-name="Standard">
      <style:text-properties officeooo:paragraph-rsid="000a6535"/>
    </style:style>
    <style:style style:name="P9" style:family="paragraph" style:parent-style-name="Standard">
      <style:text-properties officeooo:paragraph-rsid="000d493c"/>
    </style:style>
    <style:style style:name="P10" style:family="paragraph" style:parent-style-name="Standard">
      <style:text-properties officeooo:paragraph-rsid="000eccd9"/>
    </style:style>
    <style:style style:name="T1" style:family="text">
      <style:text-properties officeooo:rsid="0003da28"/>
    </style:style>
    <style:style style:name="T2" style:family="text">
      <style:text-properties officeooo:rsid="000611f0"/>
    </style:style>
    <style:style style:name="T3" style:family="text">
      <style:text-properties style:font-name="aakar"/>
    </style:style>
    <style:style style:name="T4" style:family="text">
      <style:text-properties style:font-name="aakar" officeooo:rsid="000611f0"/>
    </style:style>
    <style:style style:name="T5" style:family="text">
      <style:text-properties style:font-name="aakar" officeooo:rsid="0007f487"/>
    </style:style>
    <style:style style:name="T6" style:family="text">
      <style:text-properties style:font-name="aakar" fo:font-weight="bold" style:font-weight-asian="bold" style:font-weight-complex="bold"/>
    </style:style>
    <style:style style:name="T7" style:family="text">
      <style:text-properties style:font-name="aakar" fo:font-weight="bold" officeooo:rsid="0007f487" style:font-weight-asian="bold" style:font-weight-complex="bold"/>
    </style:style>
    <style:style style:name="T8" style:family="text">
      <style:text-properties style:font-name="aakar" officeooo:rsid="000a6535"/>
    </style:style>
    <style:style style:name="T9" style:family="text">
      <style:text-properties style:font-name="Ubuntu"/>
    </style:style>
    <style:style style:name="T10" style:family="text">
      <style:text-properties officeooo:rsid="0007f487"/>
    </style:style>
    <style:style style:name="T11" style:family="text">
      <style:text-properties fo:font-weight="bold" officeooo:rsid="0007f487" style:font-weight-asian="bold" style:font-weight-complex="bold"/>
    </style:style>
    <style:style style:name="T12" style:family="text">
      <style:text-properties fo:font-weight="normal" officeooo:rsid="0007f487" style:font-weight-asian="normal" style:font-weight-complex="normal"/>
    </style:style>
    <style:style style:name="T13" style:family="text">
      <style:text-properties style:font-name="aakar" officeooo:rsid="000a6535"/>
    </style:style>
    <style:style style:name="T14" style:family="text">
      <style:text-properties style:font-name="Ubuntu"/>
    </style:style>
    <style:style style:name="T15" style:family="text">
      <style:text-properties style:font-name="Ubuntu" officeooo:rsid="000a6535"/>
    </style:style>
    <style:style style:name="T16" style:family="text">
      <style:text-properties style:font-name="Ubuntu" officeooo:rsid="000a6535" style:font-name-asian="Noto Sans Mono CJK SC" style:font-name-complex="Liberation Mono"/>
    </style:style>
    <style:style style:name="T17" style:family="text">
      <style:text-properties style:font-name="Ubuntu" officeooo:rsid="000eccd9" style:font-name-asian="Noto Sans Mono CJK SC" style:font-name-complex="Liberation Mono"/>
    </style:style>
    <style:style style:name="T18" style:family="text">
      <style:text-properties style:font-name="Ubuntu" officeooo:rsid="000d493c"/>
    </style:style>
    <style:style style:name="T19" style:family="text">
      <style:text-properties style:font-name="Ubuntu" fo:font-weight="bold" officeooo:rsid="000d493c" style:font-weight-asian="bold" style:font-weight-complex="bold"/>
    </style:style>
    <style:style style:name="T20" style:family="text">
      <style:text-properties style:font-name="Ubuntu" officeooo:rsid="000eccd9"/>
    </style:style>
    <style:style style:name="T21" style:family="text">
      <style:text-properties fo:color="#000000" style:font-name="Ubuntu" officeooo:rsid="000d493c"/>
    </style:style>
    <style:style style:name="T22" style:family="text">
      <style:text-properties fo:color="#000000" style:font-name="Ubuntu" officeooo:rsid="000a6535" style:font-name-asian="Noto Sans Mono CJK SC" style:font-name-complex="Liberation Mono"/>
    </style:style>
    <style:style style:name="T23" style:family="text">
      <style:text-properties fo:color="#000000" style:font-name="Ubuntu" officeooo:rsid="000a6535"/>
    </style:style>
    <style:style style:name="T24" style:family="text">
      <style:text-properties fo:color="#000000" style:font-name="Ubuntu" officeooo:rsid="000eccd9"/>
    </style:style>
    <style:style style:name="T25" style:family="text">
      <style:text-properties fo:color="#000000" style:font-name="Ubuntu" fo:font-weight="bold" officeooo:rsid="000d493c" style:font-weight-asian="bold" style:font-weight-complex="bold"/>
    </style:style>
    <style:style style:name="T26" style:family="text">
      <style:text-properties fo:color="#000000" style:font-name="aakar" officeooo:rsid="000a6535"/>
    </style:style>
    <style:style style:name="T27" style:family="text">
      <style:text-properties officeooo:rsid="000ecc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5.539in" svg:y="6.5465in" svg:width="2.1409in" svg:height="2.172in" draw:z-index="0">
        <draw:image xlink:href="Pictures/10000201000001550000015AE7D200EB415B8DB7.png" xlink:type="simple" xlink:show="embed" xlink:actuate="onLoad" loext:mime-type="image/png"/>
      </draw:frame>
      <text:p text:style-name="P7">Input: train.csv test.csv</text:p>
      <text:p text:style-name="P7">no cv:</text:p>
      <text:p text:style-name="P8"><text:span text:style-name="T8">1. split train.csv to </text:span><text:span text:style-name="Source_20_Text"><text:span text:style-name="T9">X_train, X_val, y_train, y_val</text:span></text:span></text:p>
      <text:p text:style-name="P8"><text:span text:style-name="T8">2. fit(train) on </text:span><text:span text:style-name="Source_20_Text"><text:span text:style-name="T9">(X_train, y_train)</text:span></text:span></text:p>
      <text:p text:style-name="P8"><text:span text:style-name="Source_20_Text"><text:span text:style-name="T8">3. predict on </text:span></text:span><text:span text:style-name="Source_20_Text"><text:span text:style-name="T9">X_val</text:span></text:span></text:p>
      <text:p text:style-name="P8"><text:span text:style-name="Source_20_Text"><text:span text:style-name="T15">4. </text:span></text:span><text:span text:style-name="Source_20_Text"><text:span text:style-name="T16">Select</text:span></text:span><text:span text:style-name="Source_20_Text"><text:span text:style-name="T15"> the best model </text:span></text:span><text:span text:style-name="Source_20_Text"><text:span text:style-name="T18">based on the score on </text:span></text:span><text:span text:style-name="Source_20_Text"><text:span text:style-name="T19">x_val</text:span></text:span><text:span text:style-name="Source_20_Text"><text:span text:style-name="T18"> (=x_holdout)</text:span></text:span></text:p>
      <text:p text:style-name="P8"><text:span text:style-name="Source_20_Text"><text:span text:style-name="T15">5. </text:span></text:span><text:span text:style-name="Source_20_Text"><text:span text:style-name="T16">R</text:span></text:span><text:span text:style-name="Source_20_Text"><text:span text:style-name="T15">efit </text:span></text:span><text:span text:style-name="Source_20_Text"><text:span text:style-name="T17">it</text:span></text:span><text:span text:style-name="Source_20_Text"><text:span text:style-name="T15"> on X_full, y_full (entire tr</text:span></text:span><text:span text:style-name="Source_20_Text"><text:span text:style-name="T20">a</text:span></text:span><text:span text:style-name="Source_20_Text"><text:span text:style-name="T15">in.csv)</text:span></text:span></text:p>
      <text:p text:style-name="P8"><text:span text:style-name="Source_20_Text"><text:span text:style-name="T15">6. predict the unknown test.csv for submission.</text:span></text:span></text:p>
      <text:p text:style-name="P8"><text:span text:style-name="Source_20_Text"><text:span text:style-name="T15"/></text:span></text:p>
      <text:p text:style-name="P8"><text:span text:style-name="Source_20_Text"><text:span text:style-name="T15">With cv:</text:span></text:span></text:p>
      <text:p text:style-name="P9"><text:span text:style-name="Source_20_Text"><text:span text:style-name="T21">1. </text:span></text:span><text:span text:style-name="Source_20_Text"><text:span text:style-name="T26">split train.csv to </text:span></text:span><text:span text:style-name="Source_20_Text"><text:span text:style-name="T21">X_train, X_val, y_train, y_val</text:span></text:span></text:p>
      <text:p text:style-name="P9"><text:span text:style-name="Source_20_Text"><text:span text:style-name="T21">2. cross_validate on (X_train, y_train)</text:span></text:span></text:p>
      <text:p text:style-name="P9"><text:span text:style-name="Source_20_Text"><text:span text:style-name="T21">3. <text:s/></text:span></text:span><text:span text:style-name="Source_20_Text"><text:span text:style-name="T22">Select</text:span></text:span><text:span text:style-name="Source_20_Text"><text:span text:style-name="T23"> the best model </text:span></text:span><text:span text:style-name="Source_20_Text"><text:span text:style-name="T21">based on the average scores of each model over its C</text:span></text:span><text:span text:style-name="Source_20_Text"><text:span text:style-name="T24">V folds</text:span></text:span><text:span text:style-name="Source_20_Text"><text:span text:style-name="T21"> on </text:span></text:span><text:span text:style-name="Source_20_Text"><text:span text:style-name="T25">X_train</text:span></text:span></text:p>
      <text:p text:style-name="P10"><text:span text:style-name="Source_20_Text"><text:span text:style-name="T24">4. Fit the best_model on X_train and predict the x_val just for sanity check</text:span></text:span></text:p>
      <text:p text:style-name="P8"><text:span text:style-name="Source_20_Text"/></text:p>
      <text:p text:style-name="P7"/>
      <text:p text:style-name="P7"/>
      <text:p text:style-name="P3">Columns:</text:p>
      <text:p text:style-name="P3">numer = 20, types = object and float64</text:p>
      <text:p text:style-name="P3">List:</text:p>
      <text:p text:style-name="P3">['id', 'Soil_Type', 'Soil_pH', 'Soil_Moisture', 'Organic_Carbon',</text:p>
      <text:p text:style-name="P3"><text:s text:c="7"/>'Electrical_Conductivity', 'Temperature_C', 'Humidity', 'Rainfall_mm',</text:p>
      <text:p text:style-name="P3"><text:s text:c="7"/>'Sunlight_Hours', 'Wind_Speed_kmh', 'Crop_Type', 'Crop_Growth_Stage',</text:p>
      <text:p text:style-name="P3"><text:s text:c="7"/>'Season', 'Irrigation_Type', 'Water_Source', 'Field_Area_hectare',</text:p>
      <text:p text:style-name="P3"><text:s text:c="7"/>'Mulching_Used', 'Previous_Irrigation_mm', 'Region', 'Irrigation_Need']</text:p>
      <text:p text:style-name="P3"/>
      <text:p text:style-name="P3">Rows:</text:p>
      <text:p text:style-name="P3">630,000 <text:span text:style-name="T1">observation</text:span>, <text:span text:style-name="T1">no null, no duplicated, no missing value</text:span></text:p>
      <text:p text:style-name="P3"/>
      <text:p text:style-name="P3"/>
      <text:p text:style-name="P3"/>
      <text:p text:style-name="P3">There is imbalance in the label categorie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o outlier:</text:p>
      <text:p text:style-name="P3"><draw:frame draw:style-name="fr1" draw:name="Image2" text:anchor-type="char" svg:x="0.2138in" svg:y="0.1929in" svg:width="6.1457in" svg:height="3.9339in" draw:z-index="1"><draw:image xlink:href="Pictures/100002010000050F0000033DC34A4EFDC8D5644E.png" xlink:type="simple" xlink:show="embed" xlink:actuate="onLoad" loext:mime-type="image/png"/></draw:frame><text:soft-page-break/></text:p>
      <text:p text:style-name="P3"/>
      <text:p text:style-name="P3"/>
      <text:p text:style-name="P4">For some columns, an ordinal encoding makes sense:</text:p>
      <text:p text:style-name="P4"/>
      <text:p text:style-name="P4">1. Soil_Type</text:p>
      <text:p text:style-name="P6"><text:span text:style-name="T2">Soil differs in </text:span>water retention, drainage, infiltration, irrigation frequency needs.</text:p>
      <text:p text:style-name="P2"><text:span text:style-name="T4">We can use </text:span><text:span text:style-name="T7">ordinal encoding</text:span><text:span text:style-name="T5"> as</text:span><text:span text:style-name="T4">:</text:span></text:p>
      <text:p text:style-name="P2"><text:span text:style-name="Source_20_Text"><text:span text:style-name="T9">Sandy &lt; Loamy &lt; Silt &lt; Clay</text:span></text:span></text:p>
      <text:p text:style-name="P4"/>
      <text:p text:style-name="P6"><text:span text:style-name="T2">2. </text:span>Crop_Growth_Stage</text:p>
      <text:p text:style-name="P5">There is a natural order in it, <text:span text:style-name="T10">so we should use </text:span><text:span text:style-name="T11">ordinal encoding </text:span><text:span text:style-name="T12">as</text:span>:</text:p>
      <text:p text:style-name="P1"><text:span text:style-name="Source_20_Text"><text:span text:style-name="T9">Sowing &lt; Vegetative &lt; Flowering &lt; Harvest</text:span></text:span></text:p>
      <text:p text:style-name="P1"><text:span text:style-name="Source_20_Text"><text:span text:style-name="T3"/></text:span></text:p>
      <text:p text:style-name="P1"><text:span text:style-name="Source_20_Text"><text:span text:style-name="T3">3. Mulching_Used</text:span></text:span></text:p>
      <text:p text:style-name="P1"><text:span text:style-name="Source_20_Text"><text:span text:style-name="T3">It is </text:span></text:span><text:span text:style-name="Source_20_Text"><text:span text:style-name="T6">binary</text:span></text:span><text:span text:style-name="Source_20_Text"><text:span text:style-name="T3">, so we simply go with:</text:span></text:span></text:p>
      <text:p text:style-name="P1"><text:span text:style-name="Source_20_Text"><text:span text:style-name="T9">No: 0, Yes: 1</text:span></text:span></text:p>
      <text:p text:style-name="P4">4. Irrigation_Need</text:p>
      <text:p text:style-name="P2"><text:span text:style-name="T4">Our target should be encoded </text:span><text:span text:style-name="T5">using </text:span><text:span text:style-name="T7">label encoder</text:span><text:span text:style-name="T4"> as:</text:span></text:p>
      <text:p text:style-name="P2"><text:span text:style-name="Source_20_Text"><text:span text:style-name="T9">Low &lt; Medium &lt; High</text:span></text:span></text:p>
      <text:p text:style-name="P2"><text:span text:style-name="Source_20_Text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4-25T12:24:38.206858149</meta:creation-date>
    <dc:date>2026-04-26T18:40:28.631778996</dc:date>
    <meta:editing-duration>PT7H38M29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3" meta:paragraph-count="39" meta:word-count="233" meta:character-count="1595" meta:non-whitespace-character-count="1372"/>
  </office:meta>
</office:document-meta>
</file>