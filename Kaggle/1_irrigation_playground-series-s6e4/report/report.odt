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F0000033DC34A4EFDC8D5644E.png" manifest:media-type="image/png"/>
  <manifest:file-entry manifest:full-path="Pictures/10000201000001550000015AE7D200EB415B8D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Yrsa Medium" svg:font-family="'Yrsa Medium'"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11f0" officeooo:paragraph-rsid="000611f0"/>
    </style:style>
    <style:style style:name="P2" style:family="paragraph" style:parent-style-name="Standard">
      <style:text-properties officeooo:paragraph-rsid="000611f0"/>
    </style:style>
    <style:style style:name="P3" style:family="paragraph" style:parent-style-name="Standard">
      <style:text-properties style:font-name="aakar" officeooo:rsid="0003c374" officeooo:paragraph-rsid="0003c374"/>
    </style:style>
    <style:style style:name="P4" style:family="paragraph" style:parent-style-name="Standard">
      <style:text-properties style:font-name="aakar" officeooo:rsid="000611f0" officeooo:paragraph-rsid="000611f0"/>
    </style:style>
    <style:style style:name="P5" style:family="paragraph" style:parent-style-name="Standard">
      <style:text-properties style:font-name="aakar" officeooo:rsid="000611f0" officeooo:paragraph-rsid="0007f487"/>
    </style:style>
    <style:style style:name="P6" style:family="paragraph" style:parent-style-name="Standard">
      <style:text-properties style:font-name="aakar" officeooo:paragraph-rsid="000611f0"/>
    </style:style>
    <style:style style:name="P7" style:family="paragraph" style:parent-style-name="Standard">
      <style:text-properties style:font-name="aakar" officeooo:rsid="000a6535" officeooo:paragraph-rsid="000a6535"/>
    </style:style>
    <style:style style:name="P8" style:family="paragraph" style:parent-style-name="Standard">
      <style:text-properties officeooo:paragraph-rsid="000a6535"/>
    </style:style>
    <style:style style:name="P9" style:family="paragraph" style:parent-style-name="Standard">
      <style:text-properties officeooo:paragraph-rsid="000d493c"/>
    </style:style>
    <style:style style:name="P10" style:family="paragraph" style:parent-style-name="Standard">
      <style:text-properties officeooo:paragraph-rsid="000eccd9"/>
    </style:style>
    <style:style style:name="P11" style:family="paragraph" style:parent-style-name="Standard">
      <style:text-properties officeooo:paragraph-rsid="000611f0"/>
    </style:style>
    <style:style style:name="P12" style:family="paragraph" style:parent-style-name="Standard">
      <style:text-properties officeooo:paragraph-rsid="00135271"/>
    </style:style>
    <style:style style:name="P13" style:family="paragraph" style:parent-style-name="Standard">
      <style:text-properties style:font-name="aakar" officeooo:rsid="001288fb" officeooo:paragraph-rsid="00135271"/>
    </style:style>
    <style:style style:name="P14" style:family="paragraph" style:parent-style-name="Standard">
      <style:text-properties style:font-name="aakar" officeooo:rsid="001288fb" officeooo:paragraph-rsid="001288fb"/>
    </style:style>
    <style:style style:name="P15" style:family="paragraph" style:parent-style-name="Standard">
      <style:text-properties style:font-name="aakar" officeooo:rsid="000a6535" officeooo:paragraph-rsid="000a6535"/>
    </style:style>
    <style:style style:name="P16" style:family="paragraph" style:parent-style-name="Standard">
      <style:text-properties style:font-name="aakar" officeooo:rsid="000a6535" officeooo:paragraph-rsid="00143a01"/>
    </style:style>
    <style:style style:name="P17" style:family="paragraph" style:parent-style-name="Standard">
      <style:text-properties style:font-name="aakar" officeooo:rsid="00143a01" officeooo:paragraph-rsid="00143a01"/>
    </style:style>
    <style:style style:name="P18" style:family="paragraph" style:parent-style-name="Standard">
      <style:text-properties style:font-name="aakar" fo:font-weight="bold" officeooo:rsid="00143a01" officeooo:paragraph-rsid="00143a01" style:font-weight-asian="bold" style:font-weight-complex="bold"/>
    </style:style>
    <style:style style:name="P19" style:family="paragraph" style:parent-style-name="Standard">
      <style:text-properties style:font-name="aakar" fo:font-weight="bold" officeooo:rsid="00143a01" officeooo:paragraph-rsid="001876cf" style:font-weight-asian="bold" style:font-weight-complex="bold"/>
    </style:style>
    <style:style style:name="P20" style:family="paragraph" style:parent-style-name="Standard">
      <style:text-properties style:font-name="aakar" fo:font-weight="bold" officeooo:rsid="00143a01" officeooo:paragraph-rsid="0019e096" style:font-weight-asian="bold" style:font-weight-complex="bold"/>
    </style:style>
    <style:style style:name="P21" style:family="paragraph" style:parent-style-name="Standard">
      <style:text-properties style:font-name="aakar" fo:font-weight="bold" officeooo:rsid="001288fb" officeooo:paragraph-rsid="001288fb" style:font-weight-asian="bold" style:font-weight-complex="bold"/>
    </style:style>
    <style:style style:name="P22" style:family="paragraph" style:parent-style-name="Standard">
      <style:text-properties style:font-name="aakar" fo:font-weight="bold" officeooo:rsid="001876cf" officeooo:paragraph-rsid="001876cf" style:font-weight-asian="bold" style:font-weight-complex="bold"/>
    </style:style>
    <style:style style:name="P23" style:family="paragraph" style:parent-style-name="Standard">
      <style:text-properties style:font-name="aakar" fo:font-weight="bold" officeooo:rsid="0017cfc3" officeooo:paragraph-rsid="0017cfc3" style:font-weight-asian="bold" style:font-weight-complex="bold"/>
    </style:style>
    <style:style style:name="P24" style:family="paragraph" style:parent-style-name="Standard">
      <style:text-properties style:font-name="aakar" fo:font-weight="bold" officeooo:rsid="0019e096" officeooo:paragraph-rsid="0019e096" style:font-weight-asian="bold" style:font-weight-complex="bold"/>
    </style:style>
    <style:style style:name="P25" style:family="paragraph" style:parent-style-name="Standard">
      <style:text-properties style:font-name="aakar" fo:font-weight="normal" officeooo:rsid="0014f205" officeooo:paragraph-rsid="0014f205" style:font-weight-asian="normal" style:font-weight-complex="normal"/>
    </style:style>
    <style:style style:name="P26" style:family="paragraph" style:parent-style-name="Standard">
      <style:text-properties style:font-name="aakar" fo:font-weight="normal" officeooo:rsid="00165607" officeooo:paragraph-rsid="00165607" style:font-weight-asian="normal" style:font-weight-complex="normal"/>
    </style:style>
    <style:style style:name="P27" style:family="paragraph" style:parent-style-name="Standard">
      <style:text-properties style:font-name="aakar" fo:font-weight="normal" officeooo:rsid="0017cfc3" officeooo:paragraph-rsid="0017cfc3" style:font-weight-asian="normal" style:font-weight-complex="normal"/>
    </style:style>
    <style:style style:name="P28" style:family="paragraph" style:parent-style-name="Standard">
      <style:text-properties style:font-name="aakar" fo:font-weight="normal" officeooo:rsid="000a6535" officeooo:paragraph-rsid="001876cf" style:font-weight-asian="normal" style:font-weight-complex="normal"/>
    </style:style>
    <style:style style:name="P29" style:family="paragraph" style:parent-style-name="Standard">
      <style:text-properties style:font-name="aakar" officeooo:rsid="0014f205" officeooo:paragraph-rsid="0014f205"/>
    </style:style>
    <style:style style:name="P30" style:family="paragraph" style:parent-style-name="Standard">
      <style:text-properties officeooo:paragraph-rsid="00143a01"/>
    </style:style>
    <style:style style:name="P31" style:family="paragraph" style:parent-style-name="Standard">
      <style:text-properties fo:font-weight="normal" officeooo:rsid="001a7fa4" officeooo:paragraph-rsid="001a7fa4" style:font-weight-asian="normal" style:font-weight-complex="normal"/>
    </style:style>
    <style:style style:name="P32" style:family="paragraph" style:parent-style-name="Standard">
      <style:text-properties style:font-name="Ubuntu" officeooo:rsid="000a6535" officeooo:paragraph-rsid="000a6535"/>
    </style:style>
    <style:style style:name="P33" style:family="paragraph" style:parent-style-name="Standard">
      <style:text-properties style:font-name="Ubuntu" fo:font-weight="normal" officeooo:rsid="0014f205" officeooo:paragraph-rsid="0014f205" style:font-weight-asian="normal" style:font-weight-complex="normal"/>
    </style:style>
    <style:style style:name="P34" style:family="paragraph" style:parent-style-name="Standard">
      <style:text-properties style:font-name="Ubuntu" fo:font-weight="normal" officeooo:paragraph-rsid="00165607" style:font-weight-asian="normal" style:font-weight-complex="normal"/>
    </style:style>
    <style:style style:name="P35" style:family="paragraph" style:parent-style-name="Standard">
      <style:text-properties officeooo:paragraph-rsid="00165607"/>
    </style:style>
    <style:style style:name="P36" style:family="paragraph" style:parent-style-name="Standard">
      <style:text-properties fo:color="#ff0000" style:font-name="aakar" fo:font-weight="bold" officeooo:rsid="00165607" officeooo:paragraph-rsid="00165607" style:font-weight-asian="bold" style:font-weight-complex="bold"/>
    </style:style>
    <style:style style:name="P37" style:family="paragraph" style:parent-style-name="Standard">
      <style:text-properties officeooo:paragraph-rsid="0017cfc3"/>
    </style:style>
    <style:style style:name="P38" style:family="paragraph" style:parent-style-name="Standard">
      <style:text-properties officeooo:paragraph-rsid="001876cf"/>
    </style:style>
    <style:style style:name="P39" style:family="paragraph" style:parent-style-name="Standard">
      <style:text-properties officeooo:paragraph-rsid="0019e096"/>
    </style:style>
    <style:style style:name="P40" style:family="paragraph" style:parent-style-name="Standard">
      <style:text-properties officeooo:rsid="001a7fa4" officeooo:paragraph-rsid="001a7fa4"/>
    </style:style>
    <style:style style:name="P41" style:family="paragraph" style:parent-style-name="Standard">
      <style:paragraph-properties style:line-height-at-least="0.198in"/>
      <style:text-properties fo:color="#8b949e" style:font-name="Droid Sans Mono" fo:font-size="10.5pt" fo:font-weight="normal" fo:background-color="#121314"/>
    </style:style>
    <style:style style:name="P42" style:family="paragraph" style:parent-style-name="Standard">
      <style:text-properties fo:color="#8b949e" style:font-name="Droid Sans Mono" fo:font-size="10.5pt" fo:font-weight="normal" officeooo:paragraph-rsid="00135271" fo:background-color="#121314"/>
    </style:style>
    <style:style style:name="P43" style:family="paragraph" style:parent-style-name="Standard">
      <style:paragraph-properties style:line-height-at-least="0.198in"/>
    </style:style>
    <style:style style:name="T1" style:family="text">
      <style:text-properties officeooo:rsid="0003da28"/>
    </style:style>
    <style:style style:name="T2" style:family="text">
      <style:text-properties officeooo:rsid="000611f0"/>
    </style:style>
    <style:style style:name="T3" style:family="text">
      <style:text-properties style:font-name="aakar"/>
    </style:style>
    <style:style style:name="T4" style:family="text">
      <style:text-properties style:font-name="aakar" officeooo:rsid="000611f0"/>
    </style:style>
    <style:style style:name="T5" style:family="text">
      <style:text-properties style:font-name="aakar" officeooo:rsid="0007f487"/>
    </style:style>
    <style:style style:name="T6" style:family="text">
      <style:text-properties style:font-name="aakar" fo:font-weight="bold" style:font-weight-asian="bold" style:font-weight-complex="bold"/>
    </style:style>
    <style:style style:name="T7" style:family="text">
      <style:text-properties style:font-name="aakar" fo:font-weight="bold" officeooo:rsid="0007f487" style:font-weight-asian="bold" style:font-weight-complex="bold"/>
    </style:style>
    <style:style style:name="T8" style:family="text">
      <style:text-properties style:font-name="aakar" fo:font-weight="bold" officeooo:rsid="0014f205" style:font-weight-asian="bold" style:font-weight-complex="bold"/>
    </style:style>
    <style:style style:name="T9" style:family="text">
      <style:text-properties style:font-name="aakar" fo:font-weight="bold" officeooo:rsid="00165607" style:font-weight-asian="bold" style:font-weight-complex="bold"/>
    </style:style>
    <style:style style:name="T10" style:family="text">
      <style:text-properties style:font-name="aakar" fo:font-weight="bold" officeooo:rsid="0017cfc3" style:font-weight-asian="bold" style:font-weight-complex="bold"/>
    </style:style>
    <style:style style:name="T11" style:family="text">
      <style:text-properties style:font-name="aakar" fo:font-weight="bold" officeooo:rsid="001876cf" style:font-weight-asian="bold" style:font-weight-complex="bold"/>
    </style:style>
    <style:style style:name="T12" style:family="text">
      <style:text-properties style:font-name="aakar" fo:font-weight="bold" officeooo:rsid="00143a01" style:font-weight-asian="bold" style:font-weight-complex="bold"/>
    </style:style>
    <style:style style:name="T13" style:family="text">
      <style:text-properties style:font-name="aakar" officeooo:rsid="000a6535"/>
    </style:style>
    <style:style style:name="T14" style:family="text">
      <style:text-properties style:font-name="aakar" officeooo:rsid="00135271"/>
    </style:style>
    <style:style style:name="T15" style:family="text">
      <style:text-properties style:font-name="aakar" officeooo:rsid="00143a01"/>
    </style:style>
    <style:style style:name="T16" style:family="text">
      <style:text-properties style:font-name="aakar" fo:font-weight="normal" officeooo:rsid="00165607" style:font-weight-asian="normal" style:font-weight-complex="normal"/>
    </style:style>
    <style:style style:name="T17" style:family="text">
      <style:text-properties style:font-name="aakar" officeooo:rsid="001bf200"/>
    </style:style>
    <style:style style:name="T18" style:family="text">
      <style:text-properties style:font-name="Ubuntu"/>
    </style:style>
    <style:style style:name="T19" style:family="text">
      <style:text-properties style:font-name="Ubuntu" officeooo:rsid="000a6535"/>
    </style:style>
    <style:style style:name="T20" style:family="text">
      <style:text-properties style:font-name="Ubuntu" officeooo:rsid="000a6535" style:font-name-asian="Noto Sans Mono CJK SC" style:font-name-complex="Liberation Mono"/>
    </style:style>
    <style:style style:name="T21" style:family="text">
      <style:text-properties style:font-name="Ubuntu" officeooo:rsid="000eccd9" style:font-name-asian="Noto Sans Mono CJK SC" style:font-name-complex="Liberation Mono"/>
    </style:style>
    <style:style style:name="T22" style:family="text">
      <style:text-properties style:font-name="Ubuntu" officeooo:rsid="000d493c"/>
    </style:style>
    <style:style style:name="T23" style:family="text">
      <style:text-properties style:font-name="Ubuntu" fo:font-weight="bold" officeooo:rsid="000d493c" style:font-weight-asian="bold" style:font-weight-complex="bold"/>
    </style:style>
    <style:style style:name="T24" style:family="text">
      <style:text-properties style:font-name="Ubuntu" officeooo:rsid="000eccd9"/>
    </style:style>
    <style:style style:name="T25" style:family="text">
      <style:text-properties officeooo:rsid="0007f487"/>
    </style:style>
    <style:style style:name="T26" style:family="text">
      <style:text-properties fo:font-weight="bold" style:font-weight-asian="bold" style:font-weight-complex="bold"/>
    </style:style>
    <style:style style:name="T27" style:family="text">
      <style:text-properties fo:font-weight="bold" officeooo:rsid="0007f487" style:font-weight-asian="bold" style:font-weight-complex="bold"/>
    </style:style>
    <style:style style:name="T28" style:family="text">
      <style:text-properties fo:font-weight="normal" officeooo:rsid="0007f487" style:font-weight-asian="normal" style:font-weight-complex="normal"/>
    </style:style>
    <style:style style:name="T29" style:family="text">
      <style:text-properties fo:color="#000000" style:font-name="Ubuntu" officeooo:rsid="000d493c"/>
    </style:style>
    <style:style style:name="T30" style:family="text">
      <style:text-properties fo:color="#000000" style:font-name="Ubuntu" officeooo:rsid="000a6535" style:font-name-asian="Noto Sans Mono CJK SC" style:font-name-complex="Liberation Mono"/>
    </style:style>
    <style:style style:name="T31" style:family="text">
      <style:text-properties fo:color="#000000" style:font-name="Ubuntu" officeooo:rsid="000a6535"/>
    </style:style>
    <style:style style:name="T32" style:family="text">
      <style:text-properties fo:color="#000000" style:font-name="Ubuntu" officeooo:rsid="000eccd9"/>
    </style:style>
    <style:style style:name="T33" style:family="text">
      <style:text-properties fo:color="#000000" style:font-name="Ubuntu" fo:font-weight="bold" officeooo:rsid="000d493c" style:font-weight-asian="bold" style:font-weight-complex="bold"/>
    </style:style>
    <style:style style:name="T34" style:family="text">
      <style:text-properties fo:color="#000000" style:font-name="aakar" officeooo:rsid="000a6535"/>
    </style:style>
    <style:style style:name="T35" style:family="text">
      <style:text-properties officeooo:rsid="00135271"/>
    </style:style>
    <style:style style:name="T36" style:family="text">
      <style:text-properties officeooo:rsid="00143a01"/>
    </style:style>
    <style:style style:name="T37" style:family="text">
      <style:text-properties style:font-name="Ubuntu"/>
    </style:style>
    <style:style style:name="T38" style:family="text">
      <style:text-properties style:font-name="aakar"/>
    </style:style>
    <style:style style:name="T39" style:family="text">
      <style:text-properties style:font-name="aakar" officeooo:rsid="00143a01"/>
    </style:style>
    <style:style style:name="T40" style:family="text">
      <style:text-properties officeooo:rsid="0014f205"/>
    </style:style>
    <style:style style:name="T41" style:family="text">
      <style:text-properties officeooo:rsid="00165607"/>
    </style:style>
    <style:style style:name="T42" style:family="text">
      <style:text-properties officeooo:rsid="001685d9"/>
    </style:style>
    <style:style style:name="T43" style:family="text">
      <style:text-properties officeooo:rsid="0017cfc3"/>
    </style:style>
    <style:style style:name="T44" style:family="text">
      <style:text-properties officeooo:rsid="001876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5.3437in" svg:y="5.2516in" svg:width="2.1409in" svg:height="2.172in" draw:z-index="0">
        <draw:image xlink:href="Pictures/10000201000001550000015AE7D200EB415B8DB7.png" xlink:type="simple" xlink:show="embed" xlink:actuate="onLoad" loext:mime-type="image/png"/>
      </draw:frame>
      <text:p text:style-name="P24">Content:</text:p>
      <text:p text:style-name="P22"/>
      <text:p text:style-name="P22">Usage</text:p>
      <text:p text:style-name="P19">Step 1: Loading data</text:p>
      <text:p text:style-name="P19">Step 2: EDA (optional)</text:p>
      <text:p text:style-name="P19">Step 3: Modelling (optional)</text:p>
      <text:p text:style-name="P19"><text:s text:c="4"/><text:span text:style-name="T40">Step 3.1: Preprocess</text:span></text:p>
      <text:p text:style-name="P19"><text:s text:c="4"/><text:span text:style-name="T40">Step 3.</text:span><text:span text:style-name="T41">2</text:span><text:span text:style-name="T40">: </text:span><text:span text:style-name="T41">Train and Evaluate models</text:span></text:p>
      <text:p text:style-name="P19"><text:s text:c="8"/><text:span text:style-name="T44">3.2.a: Get model dict</text:span></text:p>
      <text:p text:style-name="P38"><text:span text:style-name="T12"><text:s text:c="8"/></text:span><text:span text:style-name="T11">3.2.b: Modelling (default, cv, grid)</text:span></text:p>
      <text:p text:style-name="P19"><text:s text:c="4"/><text:span text:style-name="T40">Step 3.</text:span><text:span text:style-name="T43">3</text:span><text:span text:style-name="T40">: </text:span><text:span text:style-name="T43">Predict test data</text:span></text:p>
      <text:p text:style-name="P19"/>
      <text:p text:style-name="P21"/>
      <text:p text:style-name="P21"/>
      <text:p text:style-name="P21">Usage:</text:p>
      <text:p text:style-name="P14"><text:s text:c="12"/>./predicting_Irrigation_Need.py --train-dataset ../data/train.csv</text:p>
      <text:p text:style-name="P13"><text:s text:c="12"/>--test-dataset ../data/test.csv [--drop-columns id] [--target-variable <text:span text:style-name="T35">Irrigation_Need</text:span>]</text:p>
      <text:p text:style-name="P13"><text:s text:c="12"/>[--eda] [--test-size 0.1] [--models all] [--cv 5] [--imbalance smote]</text:p>
      <text:p text:style-name="P14"><text:s text:c="12"/>[--grid-config-file ../data/grid_config.cfg] [--models-to-combine rf xgb ..] </text:p>
      <text:p text:style-name="P14"><text:tab/><text:tab/>[--output submission.csv]</text:p>
      <text:p text:style-name="P17"/>
      <text:p text:style-name="P18"/>
      <text:p text:style-name="P18">Step 1: Loading data</text:p>
      <text:p text:style-name="P32">train, test, test_id = load_data(train_path, test_path, drop_columns)</text:p>
      <text:p text:style-name="P17"/>
      <text:p text:style-name="P30"><text:span text:style-name="T15">- As we drop id column from both train and test, we save it for test_id to later put it back after predictions. </text:span></text:p>
      <text:p text:style-name="P7">- <text:span text:style-name="T36">As in our two step process of modelling (custome_process explained later) we create .. delete .. which is not exist in …, we use a try and except loop here to avoid error.</text:span></text:p>
      <text:p text:style-name="P16">-------------------------------------------------------------------------------------------</text:p>
      <text:p text:style-name="P7"/>
      <text:p text:style-name="P17"><text:span text:style-name="T26">Step 2: EDA (optional)</text:span></text:p>
      <text:p text:style-name="P7"><text:span text:style-name="T18">eda(train, target_variable)</text:span></text:p>
      <text:p text:style-name="P7"><text:span text:style-name="T18"/></text:p>
      <text:p text:style-name="P16"><text:span text:style-name="T3">- </text:span><text:span text:style-name="T15">If the user includes EDA in cmd, it will run and prints/shows:</text:span></text:p>
      <text:p text:style-name="P29"><text:span text:style-name="T15">L</text:span><text:span text:style-name="T3">ist of columns:</text:span></text:p>
      <text:p text:style-name="P29"><text:span text:style-name="T15">S</text:span><text:span text:style-name="T3">ample data:</text:span></text:p>
      <text:p text:style-name="P29"><text:span text:style-name="T3">Info:</text:span></text:p>
      <text:p text:style-name="P29"><text:span text:style-name="T3">Description:</text:span></text:p>
      <text:p text:style-name="P29"><text:span text:style-name="T3">Pair plot (if the size of data is less than 10000 to avoid a very long process):</text:span></text:p>
      <text:p text:style-name="P29"><text:span text:style-name="T3">Missing values:</text:span></text:p>
      <text:p text:style-name="P29"><text:span text:style-name="T3">Duplicated values:</text:span></text:p>
      <text:p text:style-name="P29"><text:span text:style-name="T3">Unique values for each column:</text:span></text:p>
      <text:p text:style-name="P7"><text:soft-page-break/><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span></text:p>
      <text:p text:style-name="P7"><text:span text:style-name="T18"/></text:p>
      <text:p text:style-name="P16"><text:span text:style-name="T18">-------------------------------------------------------------------------------------------</text:span></text:p>
      <text:p text:style-name="P16"><text:span text:style-name="T18"/></text:p>
      <text:p text:style-name="P18">Step 3: Modelling (optional)</text:p>
      <text:p text:style-name="P25">If the user includes model in cmd, this main step runs which itself includes several sub steps:</text:p>
      <text:p text:style-name="P25"><text:span text:style-name="T26"/></text:p>
      <text:p text:style-name="P28"><text:span text:style-name="T18"/></text:p>
      <text:p text:style-name="P28"><text:span text:style-name="T18"/></text:p>
      <text:p text:style-name="P25"><text:span text:style-name="T26">Step 3.1: Preprocess</text:span> </text:p>
      <text:p text:style-name="P33"><text:s text:c="7"/>(</text:p>
      <text:p text:style-name="P33"><text:s text:c="12"/>X_train_processed,</text:p>
      <text:p text:style-name="P33"><text:s text:c="12"/>X_val_processed,</text:p>
      <text:p text:style-name="P33"><text:s text:c="12"/>y_train_enc,</text:p>
      <text:p text:style-name="P33"><text:s text:c="12"/>y_val_enc,</text:p>
      <text:p text:style-name="P33"><text:s text:c="12"/>le,</text:p>
      <text:p text:style-name="P33"><text:s text:c="12"/>preprocessor</text:p>
      <text:p text:style-name="P33"><text:s text:c="8"/>) = preprocess_data(train, target_variable, test_size)</text:p>
      <text:p text:style-name="P25"/>
      <text:p text:style-name="P25">First, we separate X, y, then split them to train and val datasets based on the test_size which the user choose. As we have the final dataset for prediction with name test, here we use val.</text:p>
      <text:p text:style-name="P25"/>
      <text:p text:style-name="P26">We have 3 categories for y, (low, med, high) so we use LabelEncoder() to convert them to numerical values.</text:p>
      <text:p text:style-name="P26"/>
      <text:p text:style-name="P26">We gather numerical and categorical columns from X into: num_cols, cat_cols</text:p>
      <text:p text:style-name="P25"/>
      <text:p text:style-name="P36">Here, we have some hard coded part working only for this dataset:</text:p>
      <text:p text:style-name="P35"><text:span text:style-name="T16">There are natural orders in some columns which we should specify them so we can use OrdinalEncoder() with our defined order mappings on them and OneHotEncoder() for the other categorical columns without any natural order:</text:span></text:p>
      <text:p text:style-name="P26"/>
      <text:p text:style-name="P26"><text:tab/>ordinal_cols = ['Soil_Type', 'Crop_Growth_Stage']</text:p>
      <text:p text:style-name="P26"/>
      <text:p text:style-name="P26"><text:tab/>Soil_Type_mapping = ['Sandy', 'Loamy', 'Silt', 'Clay']</text:p>
      <text:p text:style-name="P26"><text:tab/>Crop_Growth_Stage_mapping = ['Sowing', 'Vegetative', 'Flowering', 'Harvest']</text:p>
      <text:p text:style-name="P25"><text:soft-page-break/></text:p>
      <text:p text:style-name="P26">We have a binary column too:</text:p>
      <text:p text:style-name="P26"><text:tab/>binary_cols = ['Mulching_Used']</text:p>
      <text:p text:style-name="P26"><text:tab/>Mulching_Used_mapping = ['No', 'Yes']</text:p>
      <text:p text:style-name="P25"/>
      <text:p text:style-name="P26">Here we create a preprocessor with ColumnTransformer to takes care of all ordinal, binary, other categorical and nume<text:tab/>rical column with their related Encoder/Scaler.</text:p>
      <text:p text:style-name="P26"/>
      <text:p text:style-name="P26">Finally, we return the processed X_train,val and y_tain,val in addition to the LabelEncoder instance and our preprocessor which we need them when it is time for predicting.</text:p>
      <text:p text:style-name="P26"/>
      <text:p text:style-name="P28"><text:span text:style-name="T18">------------------------------------------------------------------------------------------------------------------------------------------</text:span></text:p>
      <text:p text:style-name="P25"/>
      <text:p text:style-name="P35"><text:span text:style-name="T8">Step 3.</text:span><text:span text:style-name="T9">2</text:span><text:span text:style-name="T8">: </text:span><text:span text:style-name="T9">Train and Evaluate models</text:span></text:p>
      <text:p text:style-name="P34"><text:span text:style-name="T41"><text:s text:c="8"/>best_model = train_and_evaluate_models(</text:span></text:p>
      <text:p text:style-name="P34"><text:span text:style-name="T41"><text:s text:c="12"/>X_train_processed, </text:span></text:p>
      <text:p text:style-name="P34"><text:span text:style-name="T41"><text:s text:c="12"/>y_train_enc,</text:span></text:p>
      <text:p text:style-name="P34"><text:span text:style-name="T41"><text:s text:c="12"/>X_val_processed, </text:span></text:p>
      <text:p text:style-name="P34"><text:span text:style-name="T41"><text:s text:c="12"/>y_val_enc, </text:span></text:p>
      <text:p text:style-name="P34"><text:span text:style-name="T41"><text:s text:c="12"/>models,</text:span></text:p>
      <text:p text:style-name="P34"><text:span text:style-name="T41"><text:s text:c="12"/>cv, </text:span></text:p>
      <text:p text:style-name="P34"><text:span text:style-name="T41"><text:s text:c="12"/>grid_config_file, </text:span></text:p>
      <text:p text:style-name="P34"><text:span text:style-name="T41"><text:s text:c="12"/>imbalance, </text:span></text:p>
      <text:p text:style-name="P34"><text:span text:style-name="T41"><text:s text:c="12"/>le,</text:span></text:p>
      <text:p text:style-name="P34"><text:span text:style-name="T41"><text:s text:c="12"/>models_to_combin</text:span><text:span text:style-name="T42">e</text:span></text:p>
      <text:p text:style-name="P34"><text:span text:style-name="T41"><text:s text:c="8"/>)</text:span></text:p>
      <text:p text:style-name="P25"/>
      <text:p text:style-name="P27">In this function we call several other functions as:</text:p>
      <text:p text:style-name="P20"/>
      <text:p text:style-name="P20"/>
      <text:p text:style-name="P39"><text:span text:style-name="T11">3.2.a: Get model dict</text:span></text:p>
      <text:p text:style-name="P40"><text:span text:style-name="T12"/></text:p>
      <text:p text:style-name="P31"><text:span text:style-name="T15">W</text:span><text:span text:style-name="T3">e get the dictionary of {model_name:model_instance} from those models that the user choose. If the user selects all, all </text:span><text:span text:style-name="T17">available models in th erelated function, other than ['gb', 'svc', 'lsvc', 'qda', 'dummy'] are selected.</text:span></text:p>
      <text:p text:style-name="P39"><text:span text:style-name="T12"/></text:p>
      <text:p text:style-name="P39"><text:span text:style-name="T12"/></text:p>
      <text:p text:style-name="P39"><text:span text:style-name="T11">3.2.b: Modelling (default, cv, grid)</text:span></text:p>
      <text:p text:style-name="P25"/>
      <text:p text:style-name="P28"><text:span text:style-name="T18">------------------------------------------------------------------------------------------------------------------------------------------</text:span></text:p>
      <text:p text:style-name="P28"><text:span text:style-name="T18"/></text:p>
      <text:p text:style-name="P37"><text:span text:style-name="T8">Step 3.</text:span><text:span text:style-name="T10">3</text:span><text:span text:style-name="T8">: </text:span><text:span text:style-name="T10">Predict test data</text:span></text:p>
      <text:p text:style-name="P25"/>
      <text:p text:style-name="P25"/>
      <text:p text:style-name="P25"/>
      <text:p text:style-name="P28"><text:span text:style-name="T18">------------------------------------------------------------------------------------------------------------------------------------------</text:span></text:p>
      <text:p text:style-name="P28"><text:span text:style-name="T18"/></text:p>
      <text:p text:style-name="P7"><text:soft-page-break/>Input: train.csv test.csv</text:p>
      <text:p text:style-name="P7">no cv:</text:p>
      <text:p text:style-name="P8"><text:span text:style-name="T13">1. split train.csv to </text:span><text:span text:style-name="Source_20_Text"><text:span text:style-name="T18">X_train, X_val, y_train, y_val</text:span></text:span></text:p>
      <text:p text:style-name="P8"><text:span text:style-name="T13">2. fit(train) on </text:span><text:span text:style-name="Source_20_Text"><text:span text:style-name="T18">(X_train, y_train)</text:span></text:span></text:p>
      <text:p text:style-name="P8"><text:span text:style-name="Source_20_Text"><text:span text:style-name="T13">3. predict on </text:span></text:span><text:span text:style-name="Source_20_Text"><text:span text:style-name="T18">X_val</text:span></text:span></text:p>
      <text:p text:style-name="P8"><text:span text:style-name="Source_20_Text"><text:span text:style-name="T19">4. </text:span></text:span><text:span text:style-name="Source_20_Text"><text:span text:style-name="T20">Select</text:span></text:span><text:span text:style-name="Source_20_Text"><text:span text:style-name="T19"> the best model </text:span></text:span><text:span text:style-name="Source_20_Text"><text:span text:style-name="T22">based on the score on </text:span></text:span><text:span text:style-name="Source_20_Text"><text:span text:style-name="T23">x_val</text:span></text:span><text:span text:style-name="Source_20_Text"><text:span text:style-name="T22"> (=x_holdout)</text:span></text:span></text:p>
      <text:p text:style-name="P8"><text:span text:style-name="Source_20_Text"><text:span text:style-name="T19">5. </text:span></text:span><text:span text:style-name="Source_20_Text"><text:span text:style-name="T20">R</text:span></text:span><text:span text:style-name="Source_20_Text"><text:span text:style-name="T19">efit </text:span></text:span><text:span text:style-name="Source_20_Text"><text:span text:style-name="T21">it</text:span></text:span><text:span text:style-name="Source_20_Text"><text:span text:style-name="T19"> on X_full, y_full (entire tr</text:span></text:span><text:span text:style-name="Source_20_Text"><text:span text:style-name="T24">a</text:span></text:span><text:span text:style-name="Source_20_Text"><text:span text:style-name="T19">in.csv)</text:span></text:span></text:p>
      <text:p text:style-name="P8"><text:span text:style-name="Source_20_Text"><text:span text:style-name="T19">6. predict the unknown test.csv for submission.</text:span></text:span></text:p>
      <text:p text:style-name="P8"><text:span text:style-name="Source_20_Text"><text:span text:style-name="T19"/></text:span></text:p>
      <text:p text:style-name="P8"><text:span text:style-name="Source_20_Text"><text:span text:style-name="T19">With cv:</text:span></text:span></text:p>
      <text:p text:style-name="P9"><text:span text:style-name="Source_20_Text"><text:span text:style-name="T29">1. </text:span></text:span><text:span text:style-name="Source_20_Text"><text:span text:style-name="T34">split train.csv to </text:span></text:span><text:span text:style-name="Source_20_Text"><text:span text:style-name="T29">X_train, X_val, y_train, y_val</text:span></text:span></text:p>
      <text:p text:style-name="P9"><text:span text:style-name="Source_20_Text"><text:span text:style-name="T29">2. cross_validate on (X_train, y_train)</text:span></text:span></text:p>
      <text:p text:style-name="P9"><text:span text:style-name="Source_20_Text"><text:span text:style-name="T29">3. <text:s/></text:span></text:span><text:span text:style-name="Source_20_Text"><text:span text:style-name="T30">Select</text:span></text:span><text:span text:style-name="Source_20_Text"><text:span text:style-name="T31"> the best model </text:span></text:span><text:span text:style-name="Source_20_Text"><text:span text:style-name="T29">based on the average scores of each model over its C</text:span></text:span><text:span text:style-name="Source_20_Text"><text:span text:style-name="T32">V folds</text:span></text:span><text:span text:style-name="Source_20_Text"><text:span text:style-name="T29"> on </text:span></text:span><text:span text:style-name="Source_20_Text"><text:span text:style-name="T33">X_train</text:span></text:span></text:p>
      <text:p text:style-name="P10"><text:span text:style-name="Source_20_Text"><text:span text:style-name="T32">4. Fit the best_model on X_train and predict the x_val just for sanity check</text:span></text:span></text:p>
      <text:p text:style-name="P8"><text:span text:style-name="Source_20_Text"/></text:p>
      <text:p text:style-name="P7"/>
      <text:p text:style-name="P7"/>
      <text:p text:style-name="P3">Columns:</text:p>
      <text:p text:style-name="P3">numer = 20, types = object and float64</text:p>
      <text:p text:style-name="P3">List:</text:p>
      <text:p text:style-name="P3">['id', 'Soil_Type', 'Soil_pH', 'Soil_Moisture', 'Organic_Carbon',</text:p>
      <text:p text:style-name="P3"><text:s text:c="7"/>'Electrical_Conductivity', 'Temperature_C', 'Humidity', 'Rainfall_mm',</text:p>
      <text:p text:style-name="P3"><text:s text:c="7"/>'Sunlight_Hours', 'Wind_Speed_kmh', 'Crop_Type', 'Crop_Growth_Stage',</text:p>
      <text:p text:style-name="P3"><text:s text:c="7"/>'Season', 'Irrigation_Type', 'Water_Source', 'Field_Area_hectare',</text:p>
      <text:p text:style-name="P3"><text:s text:c="7"/>'Mulching_Used', 'Previous_Irrigation_mm', 'Region', 'Irrigation_Need']</text:p>
      <text:p text:style-name="P3"/>
      <text:p text:style-name="P3">Rows:</text:p>
      <text:p text:style-name="P3">630,000 <text:span text:style-name="T1">observation</text:span>, <text:span text:style-name="T1">no null, no duplicated, no missing value</text:span></text:p>
      <text:p text:style-name="P3"/>
      <text:p text:style-name="P3"/>
      <text:p text:style-name="P3"/>
      <text:p text:style-name="P3">There is imbalance in the label categori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 outlier:</text:p>
      <text:p text:style-name="P3"><draw:frame draw:style-name="fr1" draw:name="Image2" text:anchor-type="char" svg:x="0.2138in" svg:y="0.1929in" svg:width="6.1457in" svg:height="3.9339in" draw:z-index="1"><draw:image xlink:href="Pictures/100002010000050F0000033DC34A4EFDC8D5644E.png" xlink:type="simple" xlink:show="embed" xlink:actuate="onLoad" loext:mime-type="image/png"/></draw:frame><text:soft-page-break/></text:p>
      <text:p text:style-name="P3"/>
      <text:p text:style-name="P3"/>
      <text:p text:style-name="P4">For some columns, an ordinal encoding makes sense:</text:p>
      <text:p text:style-name="P4"/>
      <text:p text:style-name="P4">1. Soil_Type</text:p>
      <text:p text:style-name="P6"><text:span text:style-name="T2">Soil differs in </text:span>water retention, drainage, infiltration, irrigation frequency needs.</text:p>
      <text:p text:style-name="P2"><text:span text:style-name="T4">We can use </text:span><text:span text:style-name="T7">ordinal encoding</text:span><text:span text:style-name="T5"> as</text:span><text:span text:style-name="T4">:</text:span></text:p>
      <text:p text:style-name="P2"><text:span text:style-name="Source_20_Text"><text:span text:style-name="T18">Sandy &lt; Loamy &lt; Silt &lt; Clay</text:span></text:span></text:p>
      <text:p text:style-name="P4"/>
      <text:p text:style-name="P6"><text:span text:style-name="T2">2. </text:span>Crop_Growth_Stage</text:p>
      <text:p text:style-name="P5">There is a natural order in it, <text:span text:style-name="T25">so we should use </text:span><text:span text:style-name="T27">ordinal encoding </text:span><text:span text:style-name="T28">as</text:span>:</text:p>
      <text:p text:style-name="P1"><text:span text:style-name="Source_20_Text"><text:span text:style-name="T18">Sowing &lt; Vegetative &lt; Flowering &lt; Harvest</text:span></text:span></text:p>
      <text:p text:style-name="P1"><text:span text:style-name="Source_20_Text"><text:span text:style-name="T3"/></text:span></text:p>
      <text:p text:style-name="P1"><text:span text:style-name="Source_20_Text"><text:span text:style-name="T3">3. Mulching_Used</text:span></text:span></text:p>
      <text:p text:style-name="P1"><text:span text:style-name="Source_20_Text"><text:span text:style-name="T3">It is </text:span></text:span><text:span text:style-name="Source_20_Text"><text:span text:style-name="T6">binary</text:span></text:span><text:span text:style-name="Source_20_Text"><text:span text:style-name="T3">, so we simply go with:</text:span></text:span></text:p>
      <text:p text:style-name="P1"><text:span text:style-name="Source_20_Text"><text:span text:style-name="T18">No: 0, Yes: 1</text:span></text:span></text:p>
      <text:p text:style-name="P4">4. Irrigation_Need</text:p>
      <text:p text:style-name="P2"><text:span text:style-name="T4">Our target should be encoded </text:span><text:span text:style-name="T5">using </text:span><text:span text:style-name="T7">label encoder</text:span><text:span text:style-name="T4"> as:</text:span></text:p>
      <text:p text:style-name="P2"><text:span text:style-name="Source_20_Text"><text:span text:style-name="T18">Low &lt; Medium &lt; High</text:span></text:span></text:p>
      <text:p text:style-name="P2"><text:span text:style-name="Source_20_Text"><text:span text:style-name="T3"/></text:span></text:p>
      <text:p text:style-name="P2"><text:span text:style-name="Source_20_Text"><text:span text:style-name="T3"/></text:span></text:p>
      <text:p text:style-name="P12"><text:span text:style-name="Source_20_Text"><text:span text:style-name="T14">almost all models had no difficulty in differentiating low and high. The ambiguity was in the middle class: medium as we see here:</text:span></text:span></text:p>
      <text:p text:style-name="P12"><text:span text:style-name="Source_20_Text"><text:span text:style-name="T14">…</text:span></text:span></text:p>
      <text:p text:style-name="P12"><text:span text:style-name="Source_20_Text"><text:span text:style-name="T14"/></text:span></text:p>
      <text:p text:style-name="P12"><text:soft-page-break/><text:span text:style-name="Source_20_Text"><text:span text:style-name="T14"/></text:span></text:p>
      <text:p text:style-name="P42"># 'hgb best':</text:p>
      <text:p text:style-name="P41"># "max_iter": [200],</text:p>
      <text:p text:style-name="P41"># "learning_rate": [0.1],</text:p>
      <text:p text:style-name="P41"># "max_depth": [10],</text:p>
      <text:p text:style-name="P41"># "min_samples_leaf": [50]</text:p>
      <text:p text:style-name="P43"/>
      <text:p text:style-name="P41"># "xgb best":</text:p>
      <text:p text:style-name="P41"># "n_estimators": [300],</text:p>
      <text:p text:style-name="P41"># "max_depth": [5],</text:p>
      <text:p text:style-name="P41"># "learning_rate": [0.2],</text:p>
      <text:p text:style-name="P41"># "subsample": [1.0],</text:p>
      <text:p text:style-name="P41"># "colsample_bytree": [0.8],</text:p>
      <text:p text:style-name="P41"># "reg_lambda": [1],</text:p>
      <text:p text:style-name="P41"># "reg_alpha": [0]</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Yrsa Medium" svg:font-family="'Yrsa Medium'"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4-25T12:24:38.206858149</meta:creation-date>
    <dc:date>2026-05-10T01:38:56.342151610</dc:date>
    <meta:editing-duration>PT14H20M47S</meta:editing-duration>
    <meta:editing-cycles>6</meta:editing-cycles>
    <meta:generator>LibreOffice/6.4.7.2$Linux_X86_64 LibreOffice_project/40$Build-2</meta:generator>
    <meta:document-statistic meta:table-count="0" meta:image-count="2" meta:object-count="0" meta:page-count="7" meta:paragraph-count="145" meta:word-count="816" meta:character-count="6234" meta:non-whitespace-character-count="5231"/>
  </office:meta>
</office:document-meta>
</file>